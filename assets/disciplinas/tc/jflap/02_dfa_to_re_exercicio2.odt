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A00000106566221D3.png" manifest:media-type="image/png"/>
  <manifest:file-entry manifest:full-path="Pictures/1000000100000304000001E6C5A55EC2.png" manifest:media-type="image/png"/>
  <manifest:file-entry manifest:full-path="Pictures/1000000100000424000001A4D1CE8CDB.png" manifest:media-type="image/png"/>
  <manifest:file-entry manifest:full-path="Pictures/100000010000031900000166C5B8B735.png" manifest:media-type="image/png"/>
  <manifest:file-entry manifest:full-path="Pictures/100000010000037F00000149A78F88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quity Text A" svg:font-family="'Equity Text A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Equity Text A" fo:font-size="14pt" officeooo:rsid="0004123b" officeooo:paragraph-rsid="0004123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Equity Text A" fo:font-size="22pt" fo:font-weight="bold" officeooo:rsid="0004123b" officeooo:paragraph-rsid="0004123b" style:font-size-asian="22pt" style:font-weight-asian="bold" style:font-size-complex="2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sobre Expressões Regulares</text:p>
      <text:p text:style-name="P1"/>
      <text:p text:style-name="P1"/>
      <text:p text:style-name="P1">1. Descreva a Expressão Regular equivalente ao autômato abaixo:</text:p>
      <text:p text:style-name="P1"/>
      <text:p text:style-name="P1"><draw:frame draw:style-name="fr1" draw:name="Image1" text:anchor-type="char" svg:width="8.5cm" style:rel-width="50%" svg:height="3.083cm" style:rel-height="12%" draw:z-index="0"><draw:image xlink:href="Pictures/100000010000037F00000149A78F88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 Descreva a Expressão Regular equivalente ao autômato abaixo:</text:p>
      <text:p text:style-name="P1"/>
      <text:p text:style-name="P1"><draw:frame draw:style-name="fr1" draw:name="Image2" text:anchor-type="char" svg:width="8.5cm" style:rel-width="50%" svg:height="3.856cm" style:rel-height="15%" draw:z-index="1"><draw:image xlink:href="Pictures/100000010000031900000166C5B8B7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Descreva a Expressão Regular equivalente ao autômato abaixo:</text:p>
      <text:p text:style-name="P1"/>
      <text:p text:style-name="P1"><draw:frame draw:style-name="fr1" draw:name="Image3" text:anchor-type="char" svg:width="8.5cm" style:rel-width="50%" svg:height="3.341cm" style:rel-height="13%" draw:z-index="2"><draw:image xlink:href="Pictures/1000000100000424000001A4D1CE8C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. Descreva a Expressão Regular equivalente ao autômato abaixo:</text:p>
      <text:p text:style-name="P1"/>
      <text:p text:style-name="P1"><draw:frame draw:style-name="fr2" draw:name="Image4" text:anchor-type="char" svg:width="8.5cm" style:rel-width="50%" svg:height="5.398cm" style:rel-height="21%" draw:z-index="3"><draw:image xlink:href="Pictures/1000000100000304000001E6C5A55E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Descreva a Expressão Regular equivalente ao autômato abaixo:</text:p>
      <text:p text:style-name="P1"/>
      <text:p text:style-name="P1"><draw:frame draw:style-name="fr1" draw:name="Image5" text:anchor-type="char" svg:width="8.5cm" style:rel-width="50%" svg:height="2.057cm" style:rel-height="8%" draw:z-index="4"><draw:image xlink:href="Pictures/100000010000041A00000106566221D3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quity Text A" svg:font-family="'Equity Text A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rantes Araújo Silva Filho</meta:initial-creator>
    <meta:creation-date>2026-05-22T08:01:01.659903502</meta:creation-date>
    <dc:date>2026-05-22T08:14:05.562559600</dc:date>
    <dc:creator>Abrantes Araújo Silva Filho</dc:creator>
    <meta:editing-duration>PT2M47S</meta:editing-duration>
    <meta:editing-cycles>1</meta:editing-cycles>
    <meta:generator>LibreOffice/24.2.7.2$Linux_X86_64 LibreOffice_project/420$Build-2</meta:generator>
    <meta:document-statistic meta:table-count="0" meta:image-count="5" meta:object-count="0" meta:page-count="2" meta:paragraph-count="6" meta:word-count="49" meta:character-count="352" meta:non-whitespace-character-count="309"/>
  </office:meta>
</office:document-meta>
</file>